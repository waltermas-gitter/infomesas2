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20*80</text:p>
          </table:table-cell>
          <table:table-cell office:value-type="float" office:value="329200" calcext:value-type="float">
            <text:p>329200</text:p>
          </table:table-cell>
          <table:table-cell/>
          <table:table-cell office:value-type="float" office:value="263700" calcext:value-type="float">
            <text:p>263700</text:p>
          </table:table-cell>
          <table:table-cell/>
          <table:table-cell table:formula="of:=ROUND([.B2]*1.05;-2)" office:value-type="float" office:value="345700" calcext:value-type="float">
            <text:p>345700</text:p>
          </table:table-cell>
          <table:table-cell table:formula="of:=ROUND([.D2]*1.05;-2)" office:value-type="float" office:value="276900" calcext:value-type="float">
            <text:p>276900</text:p>
          </table:table-cell>
          <table:table-cell/>
          <table:table-cell office:value-type="string" calcext:value-type="string">
            <text:p>120*80</text:p>
          </table:table-cell>
          <table:table-cell table:formula="of:=ROUND([.G2]*0.7;-2)" office:value-type="float" office:value="193800" calcext:value-type="float">
            <text:p>193800</text:p>
          </table:table-cell>
          <table:table-cell office:value-type="string" calcext:value-type="string">
            <text:p>120-160*80</text:p>
          </table:table-cell>
          <table:table-cell table:formula="of:=ROUND([.F2]*0.7;-2)" office:value-type="float" office:value="242000" calcext:value-type="float">
            <text:p>24200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40*85</text:p>
          </table:table-cell>
          <table:table-cell office:value-type="float" office:value="346700" calcext:value-type="float">
            <text:p>346700</text:p>
          </table:table-cell>
          <table:table-cell/>
          <table:table-cell office:value-type="float" office:value="281100" calcext:value-type="float">
            <text:p>281100</text:p>
          </table:table-cell>
          <table:table-cell/>
          <table:table-cell table:formula="of:=ROUND([.B3]*1.05;-2)" office:value-type="float" office:value="364000" calcext:value-type="float">
            <text:p>364000</text:p>
          </table:table-cell>
          <table:table-cell table:formula="of:=ROUND([.D3]*1.05;-2)" office:value-type="float" office:value="295200" calcext:value-type="float">
            <text:p>295200</text:p>
          </table:table-cell>
          <table:table-cell/>
          <table:table-cell office:value-type="string" calcext:value-type="string">
            <text:p>140*85</text:p>
          </table:table-cell>
          <table:table-cell table:formula="of:=ROUND([.G3]*0.7;-2)" office:value-type="float" office:value="206600" calcext:value-type="float">
            <text:p>206600</text:p>
          </table:table-cell>
          <table:table-cell office:value-type="string" calcext:value-type="string">
            <text:p>140-180*85</text:p>
          </table:table-cell>
          <table:table-cell table:formula="of:=ROUND([.F3]*0.7;-2)" office:value-type="float" office:value="254800" calcext:value-type="float">
            <text:p>25480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60*85</text:p>
          </table:table-cell>
          <table:table-cell office:value-type="float" office:value="363100" calcext:value-type="float">
            <text:p>363100</text:p>
          </table:table-cell>
          <table:table-cell/>
          <table:table-cell office:value-type="float" office:value="296300" calcext:value-type="float">
            <text:p>296300</text:p>
          </table:table-cell>
          <table:table-cell/>
          <table:table-cell table:formula="of:=ROUND([.B4]*1.05;-2)" office:value-type="float" office:value="381300" calcext:value-type="float">
            <text:p>381300</text:p>
          </table:table-cell>
          <table:table-cell table:formula="of:=ROUND([.D4]*1.05;-2)" office:value-type="float" office:value="311100" calcext:value-type="float">
            <text:p>311100</text:p>
          </table:table-cell>
          <table:table-cell/>
          <table:table-cell office:value-type="string" calcext:value-type="string">
            <text:p>160*85</text:p>
          </table:table-cell>
          <table:table-cell table:formula="of:=ROUND([.G4]*0.7;-2)" office:value-type="float" office:value="217800" calcext:value-type="float">
            <text:p>217800</text:p>
          </table:table-cell>
          <table:table-cell office:value-type="string" calcext:value-type="string">
            <text:p>160-200*85</text:p>
          </table:table-cell>
          <table:table-cell table:formula="of:=ROUND([.F4]*0.7;-2)" office:value-type="float" office:value="266900" calcext:value-type="float">
            <text:p>26690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80*90</text:p>
          </table:table-cell>
          <table:table-cell office:value-type="float" office:value="383200" calcext:value-type="float">
            <text:p>383200</text:p>
          </table:table-cell>
          <table:table-cell/>
          <table:table-cell office:value-type="float" office:value="307200" calcext:value-type="float">
            <text:p>307200</text:p>
          </table:table-cell>
          <table:table-cell/>
          <table:table-cell table:formula="of:=ROUND([.B5]*1.05;-2)" office:value-type="float" office:value="402400" calcext:value-type="float">
            <text:p>402400</text:p>
          </table:table-cell>
          <table:table-cell table:formula="of:=ROUND([.D5]*1.05;-2)" office:value-type="float" office:value="322600" calcext:value-type="float">
            <text:p>322600</text:p>
          </table:table-cell>
          <table:table-cell/>
          <table:table-cell office:value-type="string" calcext:value-type="string">
            <text:p>180*90</text:p>
          </table:table-cell>
          <table:table-cell table:formula="of:=ROUND([.G5]*0.7;-2)" office:value-type="float" office:value="225800" calcext:value-type="float">
            <text:p>225800</text:p>
          </table:table-cell>
          <table:table-cell office:value-type="string" calcext:value-type="string">
            <text:p>180-220*90</text:p>
          </table:table-cell>
          <table:table-cell table:formula="of:=ROUND([.F5]*0.7;-2)" office:value-type="float" office:value="281700" calcext:value-type="float">
            <text:p>28170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0*90</text:p>
          </table:table-cell>
          <table:table-cell office:value-type="float" office:value="404600" calcext:value-type="float">
            <text:p>404600</text:p>
          </table:table-cell>
          <table:table-cell/>
          <table:table-cell office:value-type="float" office:value="321000" calcext:value-type="float">
            <text:p>321000</text:p>
          </table:table-cell>
          <table:table-cell/>
          <table:table-cell table:formula="of:=ROUND([.B6]*1.05;-2)" office:value-type="float" office:value="424800" calcext:value-type="float">
            <text:p>424800</text:p>
          </table:table-cell>
          <table:table-cell table:formula="of:=ROUND([.D6]*1.05;-2)" office:value-type="float" office:value="337100" calcext:value-type="float">
            <text:p>337100</text:p>
          </table:table-cell>
          <table:table-cell/>
          <table:table-cell office:value-type="string" calcext:value-type="string">
            <text:p>200*90</text:p>
          </table:table-cell>
          <table:table-cell table:formula="of:=ROUND([.G6]*0.7;-2)" office:value-type="float" office:value="236000" calcext:value-type="float">
            <text:p>236000</text:p>
          </table:table-cell>
          <table:table-cell office:value-type="string" calcext:value-type="string">
            <text:p>200-240*90</text:p>
          </table:table-cell>
          <table:table-cell table:formula="of:=ROUND([.F6]*0.7;-2)" office:value-type="float" office:value="297400" calcext:value-type="float">
            <text:p>29740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20*90</text:p>
          </table:table-cell>
          <table:table-cell office:value-type="float" office:value="421500" calcext:value-type="float">
            <text:p>421500</text:p>
          </table:table-cell>
          <table:table-cell/>
          <table:table-cell office:value-type="float" office:value="340500" calcext:value-type="float">
            <text:p>340500</text:p>
          </table:table-cell>
          <table:table-cell/>
          <table:table-cell table:formula="of:=ROUND([.B7]*1.05;-2)" office:value-type="float" office:value="442600" calcext:value-type="float">
            <text:p>442600</text:p>
          </table:table-cell>
          <table:table-cell table:formula="of:=ROUND([.D7]*1.05;-2)" office:value-type="float" office:value="357500" calcext:value-type="float">
            <text:p>357500</text:p>
          </table:table-cell>
          <table:table-cell/>
          <table:table-cell office:value-type="string" calcext:value-type="string">
            <text:p>220*90</text:p>
          </table:table-cell>
          <table:table-cell table:formula="of:=ROUND([.G7]*0.7;-2)" office:value-type="float" office:value="250300" calcext:value-type="float">
            <text:p>250300</text:p>
          </table:table-cell>
          <table:table-cell office:value-type="string" calcext:value-type="string">
            <text:p>220-260*90</text:p>
          </table:table-cell>
          <table:table-cell table:formula="of:=ROUND([.F7]*0.7;-2)" office:value-type="float" office:value="309800" calcext:value-type="float">
            <text:p>30980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*120</text:p>
          </table:table-cell>
          <table:table-cell office:value-type="float" office:value="360200" calcext:value-type="float">
            <text:p>360200</text:p>
          </table:table-cell>
          <table:table-cell/>
          <table:table-cell office:value-type="float" office:value="294900" calcext:value-type="float">
            <text:p>294900</text:p>
          </table:table-cell>
          <table:table-cell/>
          <table:table-cell table:formula="of:=ROUND([.B8]*1.05;-2)" office:value-type="float" office:value="378200" calcext:value-type="float">
            <text:p>378200</text:p>
          </table:table-cell>
          <table:table-cell table:formula="of:=ROUND([.D8]*1.05;-2)" office:value-type="float" office:value="309600" calcext:value-type="float">
            <text:p>309600</text:p>
          </table:table-cell>
          <table:table-cell/>
          <table:table-cell office:value-type="string" calcext:value-type="string">
            <text:p>120*120</text:p>
          </table:table-cell>
          <table:table-cell table:formula="of:=ROUND([.G8]*0.7;-2)" office:value-type="float" office:value="216700" calcext:value-type="float">
            <text:p>216700</text:p>
          </table:table-cell>
          <table:table-cell office:value-type="string" calcext:value-type="string">
            <text:p>120-160*120</text:p>
          </table:table-cell>
          <table:table-cell table:formula="of:=ROUND([.F8]*0.7;-2)" office:value-type="float" office:value="264700" calcext:value-type="float">
            <text:p>26470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30*130</text:p>
          </table:table-cell>
          <table:table-cell office:value-type="float" office:value="404600" calcext:value-type="float">
            <text:p>404600</text:p>
          </table:table-cell>
          <table:table-cell/>
          <table:table-cell office:value-type="float" office:value="321000" calcext:value-type="float">
            <text:p>321000</text:p>
          </table:table-cell>
          <table:table-cell/>
          <table:table-cell table:formula="of:=ROUND([.B9]*1.05;-2)" office:value-type="float" office:value="424800" calcext:value-type="float">
            <text:p>424800</text:p>
          </table:table-cell>
          <table:table-cell table:formula="of:=ROUND([.D9]*1.05;-2)" office:value-type="float" office:value="337100" calcext:value-type="float">
            <text:p>337100</text:p>
          </table:table-cell>
          <table:table-cell/>
          <table:table-cell office:value-type="string" calcext:value-type="string">
            <text:p>130*130</text:p>
          </table:table-cell>
          <table:table-cell table:formula="of:=ROUND([.G9]*0.7;-2)" office:value-type="float" office:value="236000" calcext:value-type="float">
            <text:p>236000</text:p>
          </table:table-cell>
          <table:table-cell office:value-type="string" calcext:value-type="string">
            <text:p>130-170*130</text:p>
          </table:table-cell>
          <table:table-cell table:formula="of:=ROUND([.F9]*0.7;-2)" office:value-type="float" office:value="297400" calcext:value-type="float">
            <text:p>297400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120*80</text:p>
          </table:table-cell>
          <table:table-cell office:value-type="float" office:value="276900" calcext:value-type="float">
            <text:p>276900</text:p>
          </table:table-cell>
          <table:table-cell/>
          <table:table-cell office:value-type="string" calcext:value-type="string">
            <text:p>120-160*80</text:p>
          </table:table-cell>
          <table:table-cell office:value-type="float" office:value="345700" calcext:value-type="float">
            <text:p>345700</text:p>
          </table:table-cell>
          <table:table-cell/>
          <table:table-cell office:value-type="string" calcext:value-type="string">
            <text:p>120*80</text:p>
          </table:table-cell>
          <table:table-cell table:formula="of:=ROUND([.B12]*1.1;-2)" office:value-type="float" office:value="304600" calcext:value-type="float">
            <text:p>304600</text:p>
          </table:table-cell>
          <table:table-cell office:value-type="string" calcext:value-type="string">
            <text:p>120-160*80</text:p>
          </table:table-cell>
          <table:table-cell table:formula="of:=ROUND([.E12]*1.1;-2)" office:value-type="float" office:value="380300" calcext:value-type="float">
            <text:p>3803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40*85</text:p>
          </table:table-cell>
          <table:table-cell office:value-type="float" office:value="295200" calcext:value-type="float">
            <text:p>295200</text:p>
          </table:table-cell>
          <table:table-cell/>
          <table:table-cell office:value-type="string" calcext:value-type="string">
            <text:p>140-180*85</text:p>
          </table:table-cell>
          <table:table-cell office:value-type="float" office:value="364000" calcext:value-type="float">
            <text:p>364000</text:p>
          </table:table-cell>
          <table:table-cell/>
          <table:table-cell office:value-type="string" calcext:value-type="string">
            <text:p>140*85</text:p>
          </table:table-cell>
          <table:table-cell table:formula="of:=ROUND([.B13]*1.1;-2)" office:value-type="float" office:value="324700" calcext:value-type="float">
            <text:p>324700</text:p>
          </table:table-cell>
          <table:table-cell office:value-type="string" calcext:value-type="string">
            <text:p>140-180*85</text:p>
          </table:table-cell>
          <table:table-cell table:formula="of:=ROUND([.E13]*1.1;-2)" office:value-type="float" office:value="400400" calcext:value-type="float">
            <text:p>4004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60*85</text:p>
          </table:table-cell>
          <table:table-cell office:value-type="float" office:value="311100" calcext:value-type="float">
            <text:p>311100</text:p>
          </table:table-cell>
          <table:table-cell/>
          <table:table-cell office:value-type="string" calcext:value-type="string">
            <text:p>160-200*85</text:p>
          </table:table-cell>
          <table:table-cell office:value-type="float" office:value="381300" calcext:value-type="float">
            <text:p>381300</text:p>
          </table:table-cell>
          <table:table-cell/>
          <table:table-cell office:value-type="string" calcext:value-type="string">
            <text:p>160*85</text:p>
          </table:table-cell>
          <table:table-cell table:formula="of:=ROUND([.B14]*1.1;-2)" office:value-type="float" office:value="342200" calcext:value-type="float">
            <text:p>342200</text:p>
          </table:table-cell>
          <table:table-cell office:value-type="string" calcext:value-type="string">
            <text:p>160-200*85</text:p>
          </table:table-cell>
          <table:table-cell table:formula="of:=ROUND([.E14]*1.1;-2)" office:value-type="float" office:value="419400" calcext:value-type="float">
            <text:p>4194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80*90</text:p>
          </table:table-cell>
          <table:table-cell office:value-type="float" office:value="322600" calcext:value-type="float">
            <text:p>322600</text:p>
          </table:table-cell>
          <table:table-cell/>
          <table:table-cell office:value-type="string" calcext:value-type="string">
            <text:p>180-220*90</text:p>
          </table:table-cell>
          <table:table-cell office:value-type="float" office:value="402400" calcext:value-type="float">
            <text:p>402400</text:p>
          </table:table-cell>
          <table:table-cell/>
          <table:table-cell office:value-type="string" calcext:value-type="string">
            <text:p>180*90</text:p>
          </table:table-cell>
          <table:table-cell table:formula="of:=ROUND([.B15]*1.1;-2)" office:value-type="float" office:value="354900" calcext:value-type="float">
            <text:p>354900</text:p>
          </table:table-cell>
          <table:table-cell office:value-type="string" calcext:value-type="string">
            <text:p>180-220*90</text:p>
          </table:table-cell>
          <table:table-cell table:formula="of:=ROUND([.E15]*1.1;-2)" office:value-type="float" office:value="442600" calcext:value-type="float">
            <text:p>4426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*90</text:p>
          </table:table-cell>
          <table:table-cell office:value-type="float" office:value="337100" calcext:value-type="float">
            <text:p>337100</text:p>
          </table:table-cell>
          <table:table-cell/>
          <table:table-cell office:value-type="string" calcext:value-type="string">
            <text:p>200-240*90</text:p>
          </table:table-cell>
          <table:table-cell office:value-type="float" office:value="424800" calcext:value-type="float">
            <text:p>424800</text:p>
          </table:table-cell>
          <table:table-cell/>
          <table:table-cell office:value-type="string" calcext:value-type="string">
            <text:p>200*90</text:p>
          </table:table-cell>
          <table:table-cell table:formula="of:=ROUND([.B16]*1.1;-2)" office:value-type="float" office:value="370800" calcext:value-type="float">
            <text:p>370800</text:p>
          </table:table-cell>
          <table:table-cell office:value-type="string" calcext:value-type="string">
            <text:p>200-240*90</text:p>
          </table:table-cell>
          <table:table-cell table:formula="of:=ROUND([.E16]*1.1;-2)" office:value-type="float" office:value="467300" calcext:value-type="float">
            <text:p>4673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20*90</text:p>
          </table:table-cell>
          <table:table-cell office:value-type="float" office:value="357500" calcext:value-type="float">
            <text:p>357500</text:p>
          </table:table-cell>
          <table:table-cell/>
          <table:table-cell office:value-type="string" calcext:value-type="string">
            <text:p>220-260*90</text:p>
          </table:table-cell>
          <table:table-cell office:value-type="float" office:value="442600" calcext:value-type="float">
            <text:p>442600</text:p>
          </table:table-cell>
          <table:table-cell/>
          <table:table-cell office:value-type="string" calcext:value-type="string">
            <text:p>220*90</text:p>
          </table:table-cell>
          <table:table-cell table:formula="of:=ROUND([.B17]*1.1;-2)" office:value-type="float" office:value="393300" calcext:value-type="float">
            <text:p>393300</text:p>
          </table:table-cell>
          <table:table-cell office:value-type="string" calcext:value-type="string">
            <text:p>220-260*90</text:p>
          </table:table-cell>
          <table:table-cell table:formula="of:=ROUND([.E17]*1.1;-2)" office:value-type="float" office:value="486900" calcext:value-type="float">
            <text:p>4869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0*120</text:p>
          </table:table-cell>
          <table:table-cell office:value-type="float" office:value="309600" calcext:value-type="float">
            <text:p>309600</text:p>
          </table:table-cell>
          <table:table-cell/>
          <table:table-cell office:value-type="string" calcext:value-type="string">
            <text:p>120-160*120</text:p>
          </table:table-cell>
          <table:table-cell office:value-type="float" office:value="378200" calcext:value-type="float">
            <text:p>378200</text:p>
          </table:table-cell>
          <table:table-cell/>
          <table:table-cell office:value-type="string" calcext:value-type="string">
            <text:p>120*120</text:p>
          </table:table-cell>
          <table:table-cell table:formula="of:=ROUND([.B18]*1.1;-2)" office:value-type="float" office:value="340600" calcext:value-type="float">
            <text:p>340600</text:p>
          </table:table-cell>
          <table:table-cell office:value-type="string" calcext:value-type="string">
            <text:p>120-160*120</text:p>
          </table:table-cell>
          <table:table-cell table:formula="of:=ROUND([.E18]*1.1;-2)" office:value-type="float" office:value="416000" calcext:value-type="float">
            <text:p>4160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0*130</text:p>
          </table:table-cell>
          <table:table-cell office:value-type="float" office:value="337100" calcext:value-type="float">
            <text:p>337100</text:p>
          </table:table-cell>
          <table:table-cell/>
          <table:table-cell office:value-type="string" calcext:value-type="string">
            <text:p>130-170*130</text:p>
          </table:table-cell>
          <table:table-cell office:value-type="float" office:value="424800" calcext:value-type="float">
            <text:p>424800</text:p>
          </table:table-cell>
          <table:table-cell/>
          <table:table-cell office:value-type="string" calcext:value-type="string">
            <text:p>130*130</text:p>
          </table:table-cell>
          <table:table-cell table:formula="of:=ROUND([.B19]*1.1;-2)" office:value-type="float" office:value="370800" calcext:value-type="float">
            <text:p>370800</text:p>
          </table:table-cell>
          <table:table-cell office:value-type="string" calcext:value-type="string">
            <text:p>130-170*130</text:p>
          </table:table-cell>
          <table:table-cell table:formula="of:=ROUND([.E19]*1.1;-2)" office:value-type="float" office:value="467300" calcext:value-type="float">
            <text:p>467300</text:p>
          </table:table-cell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" office:value-type="string" calcext:value-type="string">
            <text:p>120*80</text:p>
          </table:table-cell>
          <table:table-cell table:style-name="ce1" office:value-type="string" calcext:value-type="string">
            <text:p> </text:p>
          </table:table-cell>
          <table:table-cell table:style-name="ce1" office:value-type="float" office:value="239200" calcext:value-type="float">
            <text:p>239200</text:p>
          </table:table-cell>
          <table:table-cell table:formula="of:=ROUND([.B12]*0.9;-2)" office:value-type="float" office:value="249200" calcext:value-type="float">
            <text:p>249200</text:p>
          </table:table-cell>
          <table:table-cell/>
          <table:table-cell table:style-name="ce1" office:value-type="string" calcext:value-type="string">
            <text:p>120*80</text:p>
          </table:table-cell>
          <table:table-cell table:formula="of:=ROUND([.E12]*0.9;-2)" office:value-type="float" office:value="311100" calcext:value-type="float">
            <text:p>311100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140*85</text:p>
          </table:table-cell>
          <table:table-cell table:style-name="ce1" office:value-type="string" calcext:value-type="string">
            <text:p> </text:p>
          </table:table-cell>
          <table:table-cell table:style-name="ce1" office:value-type="float" office:value="246600" calcext:value-type="float">
            <text:p>246600</text:p>
          </table:table-cell>
          <table:table-cell table:formula="of:=ROUND([.B13]*0.9;-2)" office:value-type="float" office:value="265700" calcext:value-type="float">
            <text:p>265700</text:p>
          </table:table-cell>
          <table:table-cell/>
          <table:table-cell table:style-name="ce1" office:value-type="string" calcext:value-type="string">
            <text:p>140*85</text:p>
          </table:table-cell>
          <table:table-cell table:formula="of:=ROUND([.E13]*0.9;-2)" office:value-type="float" office:value="327600" calcext:value-type="float">
            <text:p>327600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160*85</text:p>
          </table:table-cell>
          <table:table-cell table:style-name="ce1" office:value-type="string" calcext:value-type="string">
            <text:p> </text:p>
          </table:table-cell>
          <table:table-cell table:style-name="ce1" office:value-type="float" office:value="260400" calcext:value-type="float">
            <text:p>260400</text:p>
          </table:table-cell>
          <table:table-cell table:formula="of:=ROUND([.B14]*0.9;-2)" office:value-type="float" office:value="280000" calcext:value-type="float">
            <text:p>280000</text:p>
          </table:table-cell>
          <table:table-cell/>
          <table:table-cell table:style-name="ce1" office:value-type="string" calcext:value-type="string">
            <text:p>160*85</text:p>
          </table:table-cell>
          <table:table-cell table:formula="of:=ROUND([.E14]*0.9;-2)" office:value-type="float" office:value="343200" calcext:value-type="float">
            <text:p>343200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180*85</text:p>
          </table:table-cell>
          <table:table-cell table:style-name="ce1" office:value-type="string" calcext:value-type="string">
            <text:p> </text:p>
          </table:table-cell>
          <table:table-cell table:style-name="ce1" office:value-type="float" office:value="277600" calcext:value-type="float">
            <text:p>277600</text:p>
          </table:table-cell>
          <table:table-cell table:formula="of:=ROUND([.B15]*0.9;-2)" office:value-type="float" office:value="290300" calcext:value-type="float">
            <text:p>290300</text:p>
          </table:table-cell>
          <table:table-cell/>
          <table:table-cell table:style-name="ce1" office:value-type="string" calcext:value-type="string">
            <text:p>180*85</text:p>
          </table:table-cell>
          <table:table-cell table:formula="of:=ROUND([.E15]*0.9;-2)" office:value-type="float" office:value="362200" calcext:value-type="float">
            <text:p>362200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200*90</text:p>
          </table:table-cell>
          <table:table-cell table:style-name="ce1" office:value-type="string" calcext:value-type="string">
            <text:p> </text:p>
          </table:table-cell>
          <table:table-cell table:style-name="ce1" office:value-type="float" office:value="291000" calcext:value-type="float">
            <text:p>291000</text:p>
          </table:table-cell>
          <table:table-cell table:formula="of:=ROUND([.B16]*0.9;-2)" office:value-type="float" office:value="303400" calcext:value-type="float">
            <text:p>303400</text:p>
          </table:table-cell>
          <table:table-cell/>
          <table:table-cell table:style-name="ce1" office:value-type="string" calcext:value-type="string">
            <text:p>200*90</text:p>
          </table:table-cell>
          <table:table-cell table:formula="of:=ROUND([.E16]*0.9;-2)" office:value-type="float" office:value="382300" calcext:value-type="float">
            <text:p>382300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220*90</text:p>
          </table:table-cell>
          <table:table-cell table:style-name="ce1" office:value-type="string" calcext:value-type="string">
            <text:p> </text:p>
          </table:table-cell>
          <table:table-cell table:style-name="ce1" office:value-type="float" office:value="306700" calcext:value-type="float">
            <text:p>306700</text:p>
          </table:table-cell>
          <table:table-cell table:formula="of:=ROUND([.B17]*0.9;-2)" office:value-type="float" office:value="321800" calcext:value-type="float">
            <text:p>321800</text:p>
          </table:table-cell>
          <table:table-cell/>
          <table:table-cell table:style-name="ce1" office:value-type="string" calcext:value-type="string">
            <text:p>220*90</text:p>
          </table:table-cell>
          <table:table-cell table:formula="of:=ROUND([.E17]*0.9;-2)" office:value-type="float" office:value="398300" calcext:value-type="float">
            <text:p>398300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redonda 120</text:p>
          </table:table-cell>
          <table:table-cell table:style-name="ce1" office:value-type="string" calcext:value-type="string">
            <text:p> </text:p>
          </table:table-cell>
          <table:table-cell table:style-name="ce1" office:value-type="float" office:value="282000" calcext:value-type="float">
            <text:p>282000</text:p>
          </table:table-cell>
          <table:table-cell office:value-type="float" office:value="300000" calcext:value-type="float">
            <text:p>300000</text:p>
          </table:table-cell>
          <table:table-cell/>
          <table:table-cell table:style-name="ce1" office:value-type="string" calcext:value-type="string">
            <text:p>redonda 120</text:p>
          </table:table-cell>
          <table:table-cell office:value-type="float" office:value="300000" calcext:value-type="float">
            <text:p>300000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63100" calcext:value-type="float">
            <text:p>363100</text:p>
          </table:table-cell>
          <table:table-cell table:style-name="ce1" office:value-type="float" office:value="296300" calcext:value-type="float">
            <text:p>296300</text:p>
          </table:table-cell>
          <table:table-cell/>
          <table:table-cell table:formula="of:=ROUND([.B32]*1.05;-2)" office:value-type="float" office:value="381300" calcext:value-type="float">
            <text:p>381300</text:p>
          </table:table-cell>
          <table:table-cell table:formula="of:=ROUND([.C32]*1.05;-2)" office:value-type="float" office:value="311100" calcext:value-type="float">
            <text:p>3111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donda 120</text:p>
          </table:table-cell>
          <table:table-cell office:value-type="float" office:value="311100" calcext:value-type="float">
            <text:p>311100</text:p>
          </table:table-cell>
          <table:table-cell/>
          <table:table-cell office:value-type="string" calcext:value-type="string">
            <text:p>redonda 120-160</text:p>
          </table:table-cell>
          <table:table-cell office:value-type="float" office:value="381300" calcext:value-type="float">
            <text:p>3813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80*60</text:p>
          </table:table-cell>
          <table:table-cell table:style-name="ce1" office:value-type="string" calcext:value-type="string">
            <text:p> </text:p>
          </table:table-cell>
          <table:table-cell table:style-name="ce1" office:value-type="float" office:value="103400" calcext:value-type="float">
            <text:p>103400</text:p>
          </table:table-cell>
          <table:table-cell/>
          <table:table-cell table:formula="of:=ROUND([.C36]*1.05;-2)" office:value-type="float" office:value="108600" calcext:value-type="float">
            <text:p>108600</text:p>
          </table:table-cell>
          <table:table-cell/>
          <table:table-cell table:style-name="ce1" office:value-type="string" calcext:value-type="string">
            <text:p>80*60</text:p>
          </table:table-cell>
          <table:table-cell office:value-type="float" office:value="108600" calcext:value-type="float">
            <text:p>108600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redonda 60</text:p>
          </table:table-cell>
          <table:table-cell table:style-name="ce1" office:value-type="string" calcext:value-type="string">
            <text:p> </text:p>
          </table:table-cell>
          <table:table-cell table:style-name="ce1" office:value-type="float" office:value="68000" calcext:value-type="float">
            <text:p>68000</text:p>
          </table:table-cell>
          <table:table-cell/>
          <table:table-cell table:formula="of:=ROUND([.C37]*1.05;-2)" office:value-type="float" office:value="71400" calcext:value-type="float">
            <text:p>71400</text:p>
          </table:table-cell>
          <table:table-cell/>
          <table:table-cell table:style-name="ce1" office:value-type="string" calcext:value-type="string">
            <text:p>redonda 60</text:p>
          </table:table-cell>
          <table:table-cell office:value-type="float" office:value="71400" calcext:value-type="float">
            <text:p>71400</text:p>
          </table:table-cell>
          <table:table-cell table:number-columns-repeated="16376"/>
        </table:table-row>
        <table:table-row table:style-name="ro1">
          <table:table-cell table:style-name="ce2" table:number-columns-repeated="16384"/>
        </table:table-row>
        <table:table-row table:style-name="ro1">
          <table:table-cell office:value-type="string" calcext:value-type="string">
            <text:p>6-202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ct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20*80</text:p>
          </table:table-cell>
          <table:table-cell office:value-type="float" office:value="276900" calcext:value-type="float">
            <text:p>276900</text:p>
          </table:table-cell>
          <table:table-cell/>
          <table:table-cell office:value-type="string" calcext:value-type="string">
            <text:p>120-160*80</text:p>
          </table:table-cell>
          <table:table-cell office:value-type="float" office:value="345700" calcext:value-type="float">
            <text:p>3457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40*85</text:p>
          </table:table-cell>
          <table:table-cell office:value-type="float" office:value="295200" calcext:value-type="float">
            <text:p>295200</text:p>
          </table:table-cell>
          <table:table-cell/>
          <table:table-cell office:value-type="string" calcext:value-type="string">
            <text:p>140-180*85</text:p>
          </table:table-cell>
          <table:table-cell office:value-type="float" office:value="364000" calcext:value-type="float">
            <text:p>3640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60*85</text:p>
          </table:table-cell>
          <table:table-cell office:value-type="float" office:value="311100" calcext:value-type="float">
            <text:p>311100</text:p>
          </table:table-cell>
          <table:table-cell/>
          <table:table-cell office:value-type="string" calcext:value-type="string">
            <text:p>160-200*85</text:p>
          </table:table-cell>
          <table:table-cell office:value-type="float" office:value="381300" calcext:value-type="float">
            <text:p>3813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80*90</text:p>
          </table:table-cell>
          <table:table-cell office:value-type="float" office:value="322600" calcext:value-type="float">
            <text:p>322600</text:p>
          </table:table-cell>
          <table:table-cell/>
          <table:table-cell office:value-type="string" calcext:value-type="string">
            <text:p>180-220*90</text:p>
          </table:table-cell>
          <table:table-cell office:value-type="float" office:value="402400" calcext:value-type="float">
            <text:p>4024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0*90</text:p>
          </table:table-cell>
          <table:table-cell office:value-type="float" office:value="337100" calcext:value-type="float">
            <text:p>337100</text:p>
          </table:table-cell>
          <table:table-cell/>
          <table:table-cell office:value-type="string" calcext:value-type="string">
            <text:p>200-240*90</text:p>
          </table:table-cell>
          <table:table-cell office:value-type="float" office:value="424800" calcext:value-type="float">
            <text:p>4248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20*90</text:p>
          </table:table-cell>
          <table:table-cell office:value-type="float" office:value="357500" calcext:value-type="float">
            <text:p>357500</text:p>
          </table:table-cell>
          <table:table-cell/>
          <table:table-cell office:value-type="string" calcext:value-type="string">
            <text:p>220-260*90</text:p>
          </table:table-cell>
          <table:table-cell office:value-type="float" office:value="442600" calcext:value-type="float">
            <text:p>442600</text:p>
          </table:table-cell>
          <table:table-cell table:number-columns-repeated="2"/>
          <table:table-cell table:formula="of:=345700*1.1" office:value-type="float" office:value="380270" calcext:value-type="float">
            <text:p>38027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20*120</text:p>
          </table:table-cell>
          <table:table-cell office:value-type="float" office:value="309600" calcext:value-type="float">
            <text:p>309600</text:p>
          </table:table-cell>
          <table:table-cell/>
          <table:table-cell office:value-type="string" calcext:value-type="string">
            <text:p>120-160*120</text:p>
          </table:table-cell>
          <table:table-cell office:value-type="float" office:value="378200" calcext:value-type="float">
            <text:p>3782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30*130</text:p>
          </table:table-cell>
          <table:table-cell office:value-type="float" office:value="337100" calcext:value-type="float">
            <text:p>337100</text:p>
          </table:table-cell>
          <table:table-cell/>
          <table:table-cell office:value-type="string" calcext:value-type="string">
            <text:p>130-170*130</text:p>
          </table:table-cell>
          <table:table-cell office:value-type="float" office:value="424800" calcext:value-type="float">
            <text:p>4248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scandinava</text:p>
          </table:table-cell>
          <table:table-cell table:style-name="ce4" office:value-type="percentage" office:value="-0.1" calcext:value-type="percentage">
            <text:p>-10,00 %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120*80</text:p>
          </table:table-cell>
          <table:table-cell office:value-type="float" office:value="249200" calcext:value-type="float">
            <text:p>249200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140*85</text:p>
          </table:table-cell>
          <table:table-cell office:value-type="float" office:value="265700" calcext:value-type="float">
            <text:p>265700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160*85</text:p>
          </table:table-cell>
          <table:table-cell office:value-type="float" office:value="280000" calcext:value-type="float">
            <text:p>280000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180*85</text:p>
          </table:table-cell>
          <table:table-cell office:value-type="float" office:value="290300" calcext:value-type="float">
            <text:p>290300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200*90</text:p>
          </table:table-cell>
          <table:table-cell office:value-type="float" office:value="303400" calcext:value-type="float">
            <text:p>303400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220*90</text:p>
          </table:table-cell>
          <table:table-cell office:value-type="float" office:value="321800" calcext:value-type="float">
            <text:p>321800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redonda 120</text:p>
          </table:table-cell>
          <table:table-cell office:value-type="float" office:value="300000" calcext:value-type="float">
            <text:p>30000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donda </text:p>
          </table:table-cell>
          <table:table-cell table:number-columns-repeated="1638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1100" calcext:value-type="float">
            <text:p>311100</text:p>
          </table:table-cell>
          <table:table-cell/>
          <table:table-cell office:value-type="string" calcext:value-type="string">
            <text:p>120-160</text:p>
          </table:table-cell>
          <table:table-cell office:value-type="float" office:value="381600" calcext:value-type="float">
            <text:p>3816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aton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80*60</text:p>
          </table:table-cell>
          <table:table-cell office:value-type="float" office:value="108600" calcext:value-type="float">
            <text:p>1086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donda 60</text:p>
          </table:table-cell>
          <table:table-cell office:value-type="float" office:value="71400" calcext:value-type="float">
            <text:p>7140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dda</text:p>
          </table:table-cell>
          <table:table-cell table:style-name="ce4" office:value-type="percentage" office:value="0.1" calcext:value-type="percentage">
            <text:p>10,00 %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0*80</text:p>
          </table:table-cell>
          <table:table-cell office:value-type="float" office:value="304600" calcext:value-type="float">
            <text:p>304600</text:p>
          </table:table-cell>
          <table:table-cell/>
          <table:table-cell office:value-type="string" calcext:value-type="string">
            <text:p>120-160*80</text:p>
          </table:table-cell>
          <table:table-cell office:value-type="float" office:value="380300" calcext:value-type="float">
            <text:p>3803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40*85</text:p>
          </table:table-cell>
          <table:table-cell office:value-type="float" office:value="324700" calcext:value-type="float">
            <text:p>324700</text:p>
          </table:table-cell>
          <table:table-cell/>
          <table:table-cell office:value-type="string" calcext:value-type="string">
            <text:p>140-180*85</text:p>
          </table:table-cell>
          <table:table-cell office:value-type="float" office:value="400400" calcext:value-type="float">
            <text:p>4004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60*85</text:p>
          </table:table-cell>
          <table:table-cell office:value-type="float" office:value="342200" calcext:value-type="float">
            <text:p>342200</text:p>
          </table:table-cell>
          <table:table-cell/>
          <table:table-cell office:value-type="string" calcext:value-type="string">
            <text:p>160-200*85</text:p>
          </table:table-cell>
          <table:table-cell office:value-type="float" office:value="419400" calcext:value-type="float">
            <text:p>4194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80*90</text:p>
          </table:table-cell>
          <table:table-cell office:value-type="float" office:value="354900" calcext:value-type="float">
            <text:p>354900</text:p>
          </table:table-cell>
          <table:table-cell/>
          <table:table-cell office:value-type="string" calcext:value-type="string">
            <text:p>180-220*90</text:p>
          </table:table-cell>
          <table:table-cell office:value-type="float" office:value="442600" calcext:value-type="float">
            <text:p>4426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0*90</text:p>
          </table:table-cell>
          <table:table-cell office:value-type="float" office:value="370800" calcext:value-type="float">
            <text:p>370800</text:p>
          </table:table-cell>
          <table:table-cell/>
          <table:table-cell office:value-type="string" calcext:value-type="string">
            <text:p>200-240*90</text:p>
          </table:table-cell>
          <table:table-cell office:value-type="float" office:value="467300" calcext:value-type="float">
            <text:p>4673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20*90</text:p>
          </table:table-cell>
          <table:table-cell office:value-type="float" office:value="393300" calcext:value-type="float">
            <text:p>393300</text:p>
          </table:table-cell>
          <table:table-cell/>
          <table:table-cell office:value-type="string" calcext:value-type="string">
            <text:p>220-260*90</text:p>
          </table:table-cell>
          <table:table-cell office:value-type="float" office:value="486900" calcext:value-type="float">
            <text:p>4869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20*120</text:p>
          </table:table-cell>
          <table:table-cell office:value-type="float" office:value="340600" calcext:value-type="float">
            <text:p>340600</text:p>
          </table:table-cell>
          <table:table-cell/>
          <table:table-cell office:value-type="string" calcext:value-type="string">
            <text:p>120-160*120</text:p>
          </table:table-cell>
          <table:table-cell office:value-type="float" office:value="416000" calcext:value-type="float">
            <text:p>4160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30*130</text:p>
          </table:table-cell>
          <table:table-cell office:value-type="float" office:value="370800" calcext:value-type="float">
            <text:p>370800</text:p>
          </table:table-cell>
          <table:table-cell/>
          <table:table-cell office:value-type="string" calcext:value-type="string">
            <text:p>130-170*130</text:p>
          </table:table-cell>
          <table:table-cell office:value-type="float" office:value="467300" calcext:value-type="float">
            <text:p>467300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7:38:32.64939288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1T15:27:55.097034044</meta:creation-date>
    <dc:date>2026-06-01T18:05:39.828400356</dc:date>
    <meta:editing-duration>PT30M24S</meta:editing-duration>
    <meta:editing-cycles>5</meta:editing-cycles>
    <meta:generator>LibreOffice/25.2.3.2$Linux_X86_64 LibreOffice_project/520$Build-2</meta:generator>
    <meta:document-statistic meta:table-count="1" meta:cell-count="294" meta:object-count="0"/>
  </office:meta>
</office:document-meta>
</file>