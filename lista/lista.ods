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20*80</text:p>
          </table:table-cell>
          <table:table-cell office:value-type="float" office:value="329200" calcext:value-type="float">
            <text:p>329200</text:p>
          </table:table-cell>
          <table:table-cell/>
          <table:table-cell office:value-type="float" office:value="263700" calcext:value-type="float">
            <text:p>263700</text:p>
          </table:table-cell>
          <table:table-cell/>
          <table:table-cell table:formula="of:=ROUND([.B2]*1.05;-2)" office:value-type="float" office:value="345700" calcext:value-type="float">
            <text:p>345700</text:p>
          </table:table-cell>
          <table:table-cell table:formula="of:=ROUND([.D2]*1.05;-2)" office:value-type="float" office:value="276900" calcext:value-type="float">
            <text:p>276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0*85</text:p>
          </table:table-cell>
          <table:table-cell office:value-type="float" office:value="346700" calcext:value-type="float">
            <text:p>346700</text:p>
          </table:table-cell>
          <table:table-cell/>
          <table:table-cell office:value-type="float" office:value="281100" calcext:value-type="float">
            <text:p>281100</text:p>
          </table:table-cell>
          <table:table-cell/>
          <table:table-cell table:formula="of:=ROUND([.B3]*1.05;-2)" office:value-type="float" office:value="364000" calcext:value-type="float">
            <text:p>364000</text:p>
          </table:table-cell>
          <table:table-cell table:formula="of:=ROUND([.D3]*1.05;-2)" office:value-type="float" office:value="295200" calcext:value-type="float">
            <text:p>295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*85</text:p>
          </table:table-cell>
          <table:table-cell office:value-type="float" office:value="363100" calcext:value-type="float">
            <text:p>363100</text:p>
          </table:table-cell>
          <table:table-cell/>
          <table:table-cell office:value-type="float" office:value="296300" calcext:value-type="float">
            <text:p>296300</text:p>
          </table:table-cell>
          <table:table-cell/>
          <table:table-cell table:formula="of:=ROUND([.B4]*1.05;-2)" office:value-type="float" office:value="381300" calcext:value-type="float">
            <text:p>381300</text:p>
          </table:table-cell>
          <table:table-cell table:formula="of:=ROUND([.D4]*1.05;-2)" office:value-type="float" office:value="311100" calcext:value-type="float">
            <text:p>311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0*90</text:p>
          </table:table-cell>
          <table:table-cell office:value-type="float" office:value="383200" calcext:value-type="float">
            <text:p>383200</text:p>
          </table:table-cell>
          <table:table-cell/>
          <table:table-cell office:value-type="float" office:value="307200" calcext:value-type="float">
            <text:p>307200</text:p>
          </table:table-cell>
          <table:table-cell/>
          <table:table-cell table:formula="of:=ROUND([.B5]*1.05;-2)" office:value-type="float" office:value="402400" calcext:value-type="float">
            <text:p>402400</text:p>
          </table:table-cell>
          <table:table-cell table:formula="of:=ROUND([.D5]*1.05;-2)" office:value-type="float" office:value="322600" calcext:value-type="float">
            <text:p>322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*90</text:p>
          </table:table-cell>
          <table:table-cell office:value-type="float" office:value="404600" calcext:value-type="float">
            <text:p>404600</text:p>
          </table:table-cell>
          <table:table-cell/>
          <table:table-cell office:value-type="float" office:value="321000" calcext:value-type="float">
            <text:p>321000</text:p>
          </table:table-cell>
          <table:table-cell/>
          <table:table-cell table:formula="of:=ROUND([.B6]*1.05;-2)" office:value-type="float" office:value="424800" calcext:value-type="float">
            <text:p>424800</text:p>
          </table:table-cell>
          <table:table-cell table:formula="of:=ROUND([.D6]*1.05;-2)" office:value-type="float" office:value="337100" calcext:value-type="float">
            <text:p>337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*90</text:p>
          </table:table-cell>
          <table:table-cell office:value-type="float" office:value="421500" calcext:value-type="float">
            <text:p>421500</text:p>
          </table:table-cell>
          <table:table-cell/>
          <table:table-cell office:value-type="float" office:value="340500" calcext:value-type="float">
            <text:p>340500</text:p>
          </table:table-cell>
          <table:table-cell/>
          <table:table-cell table:formula="of:=ROUND([.B7]*1.05;-2)" office:value-type="float" office:value="442600" calcext:value-type="float">
            <text:p>442600</text:p>
          </table:table-cell>
          <table:table-cell table:formula="of:=ROUND([.D7]*1.05;-2)" office:value-type="float" office:value="357500" calcext:value-type="float">
            <text:p>357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*120</text:p>
          </table:table-cell>
          <table:table-cell office:value-type="float" office:value="360200" calcext:value-type="float">
            <text:p>360200</text:p>
          </table:table-cell>
          <table:table-cell/>
          <table:table-cell office:value-type="float" office:value="294900" calcext:value-type="float">
            <text:p>294900</text:p>
          </table:table-cell>
          <table:table-cell/>
          <table:table-cell table:formula="of:=ROUND([.B8]*1.05;-2)" office:value-type="float" office:value="378200" calcext:value-type="float">
            <text:p>378200</text:p>
          </table:table-cell>
          <table:table-cell table:formula="of:=ROUND([.D8]*1.05;-2)" office:value-type="float" office:value="309600" calcext:value-type="float">
            <text:p>309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*130</text:p>
          </table:table-cell>
          <table:table-cell office:value-type="float" office:value="404600" calcext:value-type="float">
            <text:p>404600</text:p>
          </table:table-cell>
          <table:table-cell/>
          <table:table-cell office:value-type="float" office:value="321000" calcext:value-type="float">
            <text:p>321000</text:p>
          </table:table-cell>
          <table:table-cell/>
          <table:table-cell table:formula="of:=ROUND([.B9]*1.05;-2)" office:value-type="float" office:value="424800" calcext:value-type="float">
            <text:p>424800</text:p>
          </table:table-cell>
          <table:table-cell table:formula="of:=ROUND([.D9]*1.05;-2)" office:value-type="float" office:value="337100" calcext:value-type="float">
            <text:p>337100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120*80</text:p>
          </table:table-cell>
          <table:table-cell office:value-type="float" office:value="276900" calcext:value-type="float">
            <text:p>276900</text:p>
          </table:table-cell>
          <table:table-cell/>
          <table:table-cell office:value-type="string" calcext:value-type="string">
            <text:p>120-160*80</text:p>
          </table:table-cell>
          <table:table-cell office:value-type="float" office:value="345700" calcext:value-type="float">
            <text:p>345700</text:p>
          </table:table-cell>
          <table:table-cell/>
          <table:table-cell office:value-type="string" calcext:value-type="string">
            <text:p>120*80</text:p>
          </table:table-cell>
          <table:table-cell table:formula="of:=ROUND([.B12]*1.1;-2)" office:value-type="float" office:value="304600" calcext:value-type="float">
            <text:p>304600</text:p>
          </table:table-cell>
          <table:table-cell office:value-type="string" calcext:value-type="string">
            <text:p>120-160*80</text:p>
          </table:table-cell>
          <table:table-cell table:formula="of:=ROUND([.E12]*1.05;-2)" office:value-type="float" office:value="363000" calcext:value-type="float">
            <text:p>363000</text:p>
          </table:table-cell>
        </table:table-row>
        <table:table-row table:style-name="ro1">
          <table:table-cell office:value-type="string" calcext:value-type="string">
            <text:p>140*85</text:p>
          </table:table-cell>
          <table:table-cell office:value-type="float" office:value="295200" calcext:value-type="float">
            <text:p>295200</text:p>
          </table:table-cell>
          <table:table-cell/>
          <table:table-cell office:value-type="string" calcext:value-type="string">
            <text:p>140-180*85</text:p>
          </table:table-cell>
          <table:table-cell office:value-type="float" office:value="364000" calcext:value-type="float">
            <text:p>364000</text:p>
          </table:table-cell>
          <table:table-cell/>
          <table:table-cell office:value-type="string" calcext:value-type="string">
            <text:p>140*85</text:p>
          </table:table-cell>
          <table:table-cell table:formula="of:=ROUND([.B13]*1.1;-2)" office:value-type="float" office:value="324700" calcext:value-type="float">
            <text:p>324700</text:p>
          </table:table-cell>
          <table:table-cell office:value-type="string" calcext:value-type="string">
            <text:p>140-180*85</text:p>
          </table:table-cell>
          <table:table-cell table:formula="of:=ROUND([.E13]*1.05;-2)" office:value-type="float" office:value="382200" calcext:value-type="float">
            <text:p>382200</text:p>
          </table:table-cell>
        </table:table-row>
        <table:table-row table:style-name="ro1">
          <table:table-cell office:value-type="string" calcext:value-type="string">
            <text:p>160*85</text:p>
          </table:table-cell>
          <table:table-cell office:value-type="float" office:value="311100" calcext:value-type="float">
            <text:p>311100</text:p>
          </table:table-cell>
          <table:table-cell/>
          <table:table-cell office:value-type="string" calcext:value-type="string">
            <text:p>160-200*85</text:p>
          </table:table-cell>
          <table:table-cell office:value-type="float" office:value="381300" calcext:value-type="float">
            <text:p>381300</text:p>
          </table:table-cell>
          <table:table-cell/>
          <table:table-cell office:value-type="string" calcext:value-type="string">
            <text:p>160*85</text:p>
          </table:table-cell>
          <table:table-cell table:formula="of:=ROUND([.B14]*1.1;-2)" office:value-type="float" office:value="342200" calcext:value-type="float">
            <text:p>342200</text:p>
          </table:table-cell>
          <table:table-cell office:value-type="string" calcext:value-type="string">
            <text:p>160-200*85</text:p>
          </table:table-cell>
          <table:table-cell table:formula="of:=ROUND([.E14]*1.05;-2)" office:value-type="float" office:value="400400" calcext:value-type="float">
            <text:p>400400</text:p>
          </table:table-cell>
        </table:table-row>
        <table:table-row table:style-name="ro1">
          <table:table-cell office:value-type="string" calcext:value-type="string">
            <text:p>180*90</text:p>
          </table:table-cell>
          <table:table-cell office:value-type="float" office:value="322600" calcext:value-type="float">
            <text:p>322600</text:p>
          </table:table-cell>
          <table:table-cell/>
          <table:table-cell office:value-type="string" calcext:value-type="string">
            <text:p>180-220*90</text:p>
          </table:table-cell>
          <table:table-cell office:value-type="float" office:value="402400" calcext:value-type="float">
            <text:p>402400</text:p>
          </table:table-cell>
          <table:table-cell/>
          <table:table-cell office:value-type="string" calcext:value-type="string">
            <text:p>180*90</text:p>
          </table:table-cell>
          <table:table-cell table:formula="of:=ROUND([.B15]*1.1;-2)" office:value-type="float" office:value="354900" calcext:value-type="float">
            <text:p>354900</text:p>
          </table:table-cell>
          <table:table-cell office:value-type="string" calcext:value-type="string">
            <text:p>180-220*90</text:p>
          </table:table-cell>
          <table:table-cell table:formula="of:=ROUND([.E15]*1.05;-2)" office:value-type="float" office:value="422500" calcext:value-type="float">
            <text:p>422500</text:p>
          </table:table-cell>
        </table:table-row>
        <table:table-row table:style-name="ro1">
          <table:table-cell office:value-type="string" calcext:value-type="string">
            <text:p>200*90</text:p>
          </table:table-cell>
          <table:table-cell office:value-type="float" office:value="337100" calcext:value-type="float">
            <text:p>337100</text:p>
          </table:table-cell>
          <table:table-cell/>
          <table:table-cell office:value-type="string" calcext:value-type="string">
            <text:p>200-240*90</text:p>
          </table:table-cell>
          <table:table-cell office:value-type="float" office:value="424800" calcext:value-type="float">
            <text:p>424800</text:p>
          </table:table-cell>
          <table:table-cell/>
          <table:table-cell office:value-type="string" calcext:value-type="string">
            <text:p>200*90</text:p>
          </table:table-cell>
          <table:table-cell table:formula="of:=ROUND([.B16]*1.1;-2)" office:value-type="float" office:value="370800" calcext:value-type="float">
            <text:p>370800</text:p>
          </table:table-cell>
          <table:table-cell office:value-type="string" calcext:value-type="string">
            <text:p>200-240*90</text:p>
          </table:table-cell>
          <table:table-cell table:formula="of:=ROUND([.E16]*1.05;-2)" office:value-type="float" office:value="446000" calcext:value-type="float">
            <text:p>446000</text:p>
          </table:table-cell>
        </table:table-row>
        <table:table-row table:style-name="ro1">
          <table:table-cell office:value-type="string" calcext:value-type="string">
            <text:p>220*90</text:p>
          </table:table-cell>
          <table:table-cell office:value-type="float" office:value="357500" calcext:value-type="float">
            <text:p>357500</text:p>
          </table:table-cell>
          <table:table-cell/>
          <table:table-cell office:value-type="string" calcext:value-type="string">
            <text:p>220-260*90</text:p>
          </table:table-cell>
          <table:table-cell office:value-type="float" office:value="442600" calcext:value-type="float">
            <text:p>442600</text:p>
          </table:table-cell>
          <table:table-cell/>
          <table:table-cell office:value-type="string" calcext:value-type="string">
            <text:p>220*90</text:p>
          </table:table-cell>
          <table:table-cell table:formula="of:=ROUND([.B17]*1.1;-2)" office:value-type="float" office:value="393300" calcext:value-type="float">
            <text:p>393300</text:p>
          </table:table-cell>
          <table:table-cell office:value-type="string" calcext:value-type="string">
            <text:p>220-260*90</text:p>
          </table:table-cell>
          <table:table-cell table:formula="of:=ROUND([.E17]*1.05;-2)" office:value-type="float" office:value="464700" calcext:value-type="float">
            <text:p>464700</text:p>
          </table:table-cell>
        </table:table-row>
        <table:table-row table:style-name="ro1">
          <table:table-cell office:value-type="string" calcext:value-type="string">
            <text:p>120*120</text:p>
          </table:table-cell>
          <table:table-cell office:value-type="float" office:value="309600" calcext:value-type="float">
            <text:p>309600</text:p>
          </table:table-cell>
          <table:table-cell/>
          <table:table-cell office:value-type="string" calcext:value-type="string">
            <text:p>120-160*120</text:p>
          </table:table-cell>
          <table:table-cell office:value-type="float" office:value="378200" calcext:value-type="float">
            <text:p>378200</text:p>
          </table:table-cell>
          <table:table-cell/>
          <table:table-cell office:value-type="string" calcext:value-type="string">
            <text:p>120*120</text:p>
          </table:table-cell>
          <table:table-cell table:formula="of:=ROUND([.B18]*1.1;-2)" office:value-type="float" office:value="340600" calcext:value-type="float">
            <text:p>340600</text:p>
          </table:table-cell>
          <table:table-cell office:value-type="string" calcext:value-type="string">
            <text:p>120-160*120</text:p>
          </table:table-cell>
          <table:table-cell table:formula="of:=ROUND([.E18]*1.05;-2)" office:value-type="float" office:value="397100" calcext:value-type="float">
            <text:p>397100</text:p>
          </table:table-cell>
        </table:table-row>
        <table:table-row table:style-name="ro1">
          <table:table-cell office:value-type="string" calcext:value-type="string">
            <text:p>130*130</text:p>
          </table:table-cell>
          <table:table-cell office:value-type="float" office:value="337100" calcext:value-type="float">
            <text:p>337100</text:p>
          </table:table-cell>
          <table:table-cell/>
          <table:table-cell office:value-type="string" calcext:value-type="string">
            <text:p>130-170*130</text:p>
          </table:table-cell>
          <table:table-cell office:value-type="float" office:value="424800" calcext:value-type="float">
            <text:p>424800</text:p>
          </table:table-cell>
          <table:table-cell/>
          <table:table-cell office:value-type="string" calcext:value-type="string">
            <text:p>130*130</text:p>
          </table:table-cell>
          <table:table-cell table:formula="of:=ROUND([.B19]*1.1;-2)" office:value-type="float" office:value="370800" calcext:value-type="float">
            <text:p>370800</text:p>
          </table:table-cell>
          <table:table-cell office:value-type="string" calcext:value-type="string">
            <text:p>130-170*130</text:p>
          </table:table-cell>
          <table:table-cell table:formula="of:=ROUND([.E19]*1.05;-2)" office:value-type="float" office:value="446000" calcext:value-type="float">
            <text:p>44600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" office:value-type="string" calcext:value-type="string">
            <text:p>120*80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239200" calcext:value-type="float">
            <text:p>239200</text:p>
          </table:table-cell>
          <table:table-cell table:formula="of:=ROUND([.B12]*0.9;-2)" office:value-type="float" office:value="249200" calcext:value-type="float">
            <text:p>249200</text:p>
          </table:table-cell>
          <table:table-cell/>
          <table:table-cell table:style-name="ce1" office:value-type="string" calcext:value-type="string">
            <text:p>120*80</text:p>
          </table:table-cell>
          <table:table-cell table:formula="of:=ROUND([.E12]*0.9;-2)" office:value-type="float" office:value="311100" calcext:value-type="float">
            <text:p>311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40*85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246600" calcext:value-type="float">
            <text:p>246600</text:p>
          </table:table-cell>
          <table:table-cell table:formula="of:=ROUND([.B13]*0.9;-2)" office:value-type="float" office:value="265700" calcext:value-type="float">
            <text:p>265700</text:p>
          </table:table-cell>
          <table:table-cell/>
          <table:table-cell table:style-name="ce1" office:value-type="string" calcext:value-type="string">
            <text:p>140*85</text:p>
          </table:table-cell>
          <table:table-cell table:formula="of:=ROUND([.E13]*0.9;-2)" office:value-type="float" office:value="327600" calcext:value-type="float">
            <text:p>3276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60*85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260400" calcext:value-type="float">
            <text:p>260400</text:p>
          </table:table-cell>
          <table:table-cell table:formula="of:=ROUND([.B14]*0.9;-2)" office:value-type="float" office:value="280000" calcext:value-type="float">
            <text:p>280000</text:p>
          </table:table-cell>
          <table:table-cell/>
          <table:table-cell table:style-name="ce1" office:value-type="string" calcext:value-type="string">
            <text:p>160*85</text:p>
          </table:table-cell>
          <table:table-cell table:formula="of:=ROUND([.E14]*0.9;-2)" office:value-type="float" office:value="343200" calcext:value-type="float">
            <text:p>3432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0*85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277600" calcext:value-type="float">
            <text:p>277600</text:p>
          </table:table-cell>
          <table:table-cell table:formula="of:=ROUND([.B15]*0.9;-2)" office:value-type="float" office:value="290300" calcext:value-type="float">
            <text:p>290300</text:p>
          </table:table-cell>
          <table:table-cell/>
          <table:table-cell table:style-name="ce1" office:value-type="string" calcext:value-type="string">
            <text:p>180*85</text:p>
          </table:table-cell>
          <table:table-cell table:formula="of:=ROUND([.E15]*0.9;-2)" office:value-type="float" office:value="362200" calcext:value-type="float">
            <text:p>3622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0*90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291000" calcext:value-type="float">
            <text:p>291000</text:p>
          </table:table-cell>
          <table:table-cell table:formula="of:=ROUND([.B16]*0.9;-2)" office:value-type="float" office:value="303400" calcext:value-type="float">
            <text:p>303400</text:p>
          </table:table-cell>
          <table:table-cell/>
          <table:table-cell table:style-name="ce1" office:value-type="string" calcext:value-type="string">
            <text:p>200*90</text:p>
          </table:table-cell>
          <table:table-cell table:formula="of:=ROUND([.E16]*0.9;-2)" office:value-type="float" office:value="382300" calcext:value-type="float">
            <text:p>3823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0*90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306700" calcext:value-type="float">
            <text:p>306700</text:p>
          </table:table-cell>
          <table:table-cell table:formula="of:=ROUND([.B17]*0.9;-2)" office:value-type="float" office:value="321800" calcext:value-type="float">
            <text:p>321800</text:p>
          </table:table-cell>
          <table:table-cell/>
          <table:table-cell table:style-name="ce1" office:value-type="string" calcext:value-type="string">
            <text:p>220*90</text:p>
          </table:table-cell>
          <table:table-cell table:formula="of:=ROUND([.E17]*0.9;-2)" office:value-type="float" office:value="398300" calcext:value-type="float">
            <text:p>3983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donda 120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282000" calcext:value-type="float">
            <text:p>282000</text:p>
          </table:table-cell>
          <table:table-cell office:value-type="float" office:value="300000" calcext:value-type="float">
            <text:p>300000</text:p>
          </table:table-cell>
          <table:table-cell/>
          <table:table-cell table:style-name="ce1" office:value-type="string" calcext:value-type="string">
            <text:p>redonda 120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63100" calcext:value-type="float">
            <text:p>363100</text:p>
          </table:table-cell>
          <table:table-cell table:style-name="ce1" office:value-type="float" office:value="296300" calcext:value-type="float">
            <text:p>296300</text:p>
          </table:table-cell>
          <table:table-cell/>
          <table:table-cell table:formula="of:=ROUND([.B32]*1.05;-2)" office:value-type="float" office:value="381300" calcext:value-type="float">
            <text:p>381300</text:p>
          </table:table-cell>
          <table:table-cell table:formula="of:=ROUND([.C32]*1.05;-2)" office:value-type="float" office:value="311100" calcext:value-type="float">
            <text:p>31110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donda 120</text:p>
          </table:table-cell>
          <table:table-cell office:value-type="float" office:value="311100" calcext:value-type="float">
            <text:p>311100</text:p>
          </table:table-cell>
          <table:table-cell/>
          <table:table-cell office:value-type="string" calcext:value-type="string">
            <text:p>redonda 120-160</text:p>
          </table:table-cell>
          <table:table-cell office:value-type="float" office:value="381300" calcext:value-type="float">
            <text:p>3813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80*60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103400" calcext:value-type="float">
            <text:p>103400</text:p>
          </table:table-cell>
          <table:table-cell/>
          <table:table-cell table:formula="of:=ROUND([.C36]*1.05;-2)" office:value-type="float" office:value="108600" calcext:value-type="float">
            <text:p>108600</text:p>
          </table:table-cell>
          <table:table-cell/>
          <table:table-cell table:style-name="ce1" office:value-type="string" calcext:value-type="string">
            <text:p>80*60</text:p>
          </table:table-cell>
          <table:table-cell office:value-type="float" office:value="108600" calcext:value-type="float">
            <text:p>1086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donda 60</text:p>
          </table:table-cell>
          <table:table-cell table:style-name="ce1" office:value-type="string" calcext:value-type="string">
            <text:p> </text:p>
          </table:table-cell>
          <table:table-cell table:style-name="ce1" office:value-type="float" office:value="68000" calcext:value-type="float">
            <text:p>68000</text:p>
          </table:table-cell>
          <table:table-cell/>
          <table:table-cell table:formula="of:=ROUND([.C37]*1.05;-2)" office:value-type="float" office:value="71400" calcext:value-type="float">
            <text:p>71400</text:p>
          </table:table-cell>
          <table:table-cell/>
          <table:table-cell table:style-name="ce1" office:value-type="string" calcext:value-type="string">
            <text:p>redonda 60</text:p>
          </table:table-cell>
          <table:table-cell office:value-type="float" office:value="71400" calcext:value-type="float">
            <text:p>714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1T15:27:55.097034044</meta:creation-date>
    <dc:date>2026-06-01T16:08:46.945524460</dc:date>
    <meta:editing-duration>PT16M5S</meta:editing-duration>
    <meta:editing-cycles>3</meta:editing-cycles>
    <meta:generator>LibreOffice/25.2.3.2$Linux_X86_64 LibreOffice_project/520$Build-2</meta:generator>
    <meta:document-statistic meta:table-count="1" meta:cell-count="167" meta:object-count="0"/>
  </office:meta>
</office:document-meta>
</file>